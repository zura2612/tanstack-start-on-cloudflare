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>
        <style:tab-stops>
          <style:tab-stop style:position="3.26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3.263cm"/>
        </style:tab-stops>
      </style:paragraph-properties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T1" style:family="text">
      <style:text-properties officeooo:rsid="00070894"/>
    </style:style>
    <style:style style:name="T2" style:family="text">
      <style:text-properties officeooo:rsid="0008c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gal</text:span> N<text:span text:style-name="T1">otice</text:span></text:p>
      <text:p text:style-name="P2"/>
      <text:p text:style-name="P2"/>
      <text:p text:style-name="P3">1. Website Publisher</text:p>
      <text:p text:style-name="P3">The website www.f<text:span text:style-name="T2">v</text:span>elec47.com is published by: F<text:span text:style-name="T2">V</text:span> ELEC 47</text:p>
      <text:p text:style-name="P3">• Company Name: F<text:span text:style-name="T2">V</text:span> ELEC 47</text:p>
      <text:p text:style-name="P3">• Registered Office: <text:span text:style-name="T2">148</text:span> Route de Guérin, 47250 Bouglon, France</text:p>
      <text:p text:style-name="P3">• SIRET Number: 983070152000<text:span text:style-name="T2">00</text:span></text:p>
      <text:p text:style-name="P3">• Publication Director: <text:span text:style-name="T2">François Vauchot</text:span></text:p>
      <text:p text:style-name="P3">• Email: fr<text:span text:style-name="T2">ancois.vauchot@gmail.com</text:span></text:p>
      <text:p text:style-name="P3">• Phone: +33 6 <text:span text:style-name="T2">52</text:span> <text:span text:style-name="T2">72</text:span> <text:span text:style-name="T2">85</text:span> <text:span text:style-name="T2">69</text:span></text:p>
      <text:p text:style-name="P3"/>
      <text:p text:style-name="P3">2. Website Host</text:p>
      <text:p text:style-name="P3">The website is hosted by: To be determined</text:p>
      <text:p text:style-name="P3">Address and technical details will be provided at www.site.com.</text:p>
      <text:p text:style-name="P3"/>
      <text:p text:style-name="P3">3. Website Design &amp; Management</text:p>
      <text:p text:style-name="P3">The website was designed, launched, and is maintained by François Vauchot</text:p>
      <text:p text:style-name="P3">• Address: 148 Route de Figuès, 47250 Argenton, France</text:p>
      <text:p text:style-name="P3">• Email: francois.vauchot@gmail.com</text:p>
      <text:p text:style-name="P3"/>
      <text:p text:style-name="P3">4. Intellectual Property</text:p>
      <text:p text:style-name="P3">All content present on the website (texts, images, logos, etc.) is the exclusive property of F<text:span text:style-name="T2">V</text:span> ELEC 47, unless otherwise stated. Any reproduction, even partial, without prior authorization is strictly prohibited.</text:p>
      <text:p text:style-name="P3"/>
      <text:p text:style-name="P3">5. Liability</text:p>
      <text:p text:style-name="P3">The publisher strives to provide accurate and up-to-date information but cannot be held liable for any errors or omissions.</text:p>
      <text:p text:style-name="P3"/>
      <text:p text:style-name="P3">6. Hyperlinks</text:p>
      <text:p text:style-name="P3">The website contains hyperlinks to social media platforms (Facebook, Instagram, and LinkedIn), as well as buttons allowing direct calls or emails to <text:span text:style-name="T2">FV</text:span> ELEC 47. <text:span text:style-name="T2">The company</text:span> is not responsible for the content of external linked websites.</text:p>
      <text:p text:style-name="P3"/>
      <text:p text:style-name="P3">7. Governing Law</text:p>
      <text:p text:style-name="P3">These legal notices are governed by French la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05T07:09:56.333000000</dc:date>
    <meta:editing-duration>PT3M47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203" meta:character-count="1304" meta:non-whitespace-character-count="1125"/>
  </office:meta>
</office:document-meta>
</file>