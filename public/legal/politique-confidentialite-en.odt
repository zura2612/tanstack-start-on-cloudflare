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T1" style:family="text">
      <style:text-properties officeooo:rsid="00188d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vacy Policy</text:p>
      <text:p text:style-name="P1"/>
      <text:p text:style-name="P1"/>
      <text:p text:style-name="P3">1. Data Collected</text:p>
      <text:p text:style-name="P3">The website www.f<text:span text:style-name="T1">v</text:span>elec47.com does not collect any personal data.</text:p>
      <text:p text:style-name="P3"/>
      <text:p text:style-name="P3">2. Data Usage</text:p>
      <text:p text:style-name="P3">No personal data is collected or processed by F<text:span text:style-name="T1">V</text:span> ELEC 47.</text:p>
      <text:p text:style-name="P3"/>
      <text:p text:style-name="P3">3. Data Sharing</text:p>
      <text:p text:style-name="P3">Data is not sold or transferred to third parties, as no data collection is performed.</text:p>
      <text:p text:style-name="P3"/>
      <text:p text:style-name="P3">4. Cookies</text:p>
      <text:p text:style-name="P3">The website does not use cookies for advertising or analytics purposes. It only contains hyperlinks redirecting to social media platforms (Facebook, Instagram, and LinkedIn), as well as call and email buttons.</text:p>
      <text:p text:style-name="P3"/>
      <text:p text:style-name="P3">5. Contact</text:p>
      <text:p text:style-name="P3">For any questions regarding this privacy policy, please contact us at fr<text:span text:style-name="T1">ancois.vauchot@gmail.co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6-05T07:16:35.092000000</dc:date>
    <meta:editing-duration>PT2M32S</meta:editing-duration>
    <meta:editing-cycles>3</meta:editing-cycles>
    <meta:generator>LibreOffice/7.1.3.2$Windows_X86_64 LibreOffice_project/47f78053abe362b9384784d31a6e56f8511eb1c1</meta:generator>
    <meta:document-statistic meta:table-count="0" meta:image-count="0" meta:object-count="0" meta:page-count="1" meta:paragraph-count="11" meta:word-count="93" meta:character-count="591" meta:non-whitespace-character-count="509"/>
  </office:meta>
</office:document-meta>
</file>