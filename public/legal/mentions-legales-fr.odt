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2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Georgia_1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Liberation_Sans_1.ttf" manifest:media-type="application/x-font-ttf"/>
  <manifest:file-entry manifest:full-path="Fonts/Font_Georgia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f07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tions Légales</text:p>
      <text:p text:style-name="P1"/>
      <text:p text:style-name="P1"/>
      <text:p text:style-name="Standard">1. Éditeur du site </text:p>
      <text:p text:style-name="Standard">Le site www.f<text:span text:style-name="T1">v</text:span>elec47.com est édité par : F<text:span text:style-name="T1">V</text:span> ELEC 47 </text:p>
      <text:p text:style-name="Standard">Nom de l'entreprise : F<text:span text:style-name="T1">V</text:span> ELEC 47 </text:p>
      <text:p text:style-name="Standard">Siège social : <text:span text:style-name="T1">148</text:span> ROUTE DE GUERIN, 47250 BOUGLON, France </text:p>
      <text:p text:style-name="Standard">Numéro SIRET : 983070152000<text:span text:style-name="T1">00</text:span> </text:p>
      <text:p text:style-name="Standard">Responsable de publication : <text:span text:style-name="T1">François Vauchot</text:span> </text:p>
      <text:p text:style-name="Standard">Email : fr<text:span text:style-name="T1">ancois.vauchot@gmail.com</text:span> </text:p>
      <text:p text:style-name="Standard">Téléphone : 06 <text:span text:style-name="T1">52 72 85 69</text:span> </text:p>
      <text:p text:style-name="Standard"/>
      <text:p text:style-name="Standard">2. Hébergeur du site </text:p>
      <text:p text:style-name="Standard">Le site est hébergé par : A venir</text:p>
      <text:p text:style-name="Standard">Adresses et informations disponibles sur www.site.com.</text:p>
      <text:p text:style-name="Standard"/>
      <text:p text:style-name="Standard">3. Conception et gestion du site </text:p>
      <text:p text:style-name="Standard">Le site a été conçu, mis en ligne et est maintenu par François Vauchot</text:p>
      <text:p text:style-name="Standard">Adresse : 148 route de Figuès 47250 Argenton France</text:p>
      <text:p text:style-name="Standard">Email : francois.<text:a xlink:type="simple" xlink:href="mailto:vauchot@gmail.com" text:style-name="Internet_20_link" text:visited-style-name="Visited_20_Internet_20_Link">vauchot</text:a><text:a xlink:type="simple" xlink:href="mailto:vauchot@gmail.com" text:style-name="Internet_20_link" text:visited-style-name="Visited_20_Internet_20_Link">@gmail.com</text:a></text:p>
      <text:p text:style-name="Standard"/>
      <text:p text:style-name="Standard">4. Propriété intellectuelle </text:p>
      <text:p text:style-name="Standard">Tous les contenus présents sur le site (textes, images, logos, etc.) sont la propriété exclusive de F<text:span text:style-name="T1">V</text:span> ELEC 47, sauf mentions contraires. Toute reproduction, même partielle, sans autorisation est interdite.</text:p>
      <text:p text:style-name="Standard"/>
      <text:p text:style-name="Standard">5. Responsabilités </text:p>
      <text:p text:style-name="Standard">L'éditeur du site s'efforce de fournir des informations exactes et mises à jour, mais ne saurait être tenu responsable en cas d'erreurs ou d'omissions.</text:p>
      <text:p text:style-name="Standard"/>
      <text:p text:style-name="Standard">6. Liens hypertextes </text:p>
      <text:p text:style-name="Standard">Le site contient des liens hypertextes permettant d'accéder aux réseaux sociaux Facebook, Instagram et LinkedIn, ainsi que des boutons permettant d'appeler directement ou d'envoyer un email à FR ELEC 47. <text:span text:style-name="T1">L’entreprise</text:span> n'est pas responsable du contenu des sites externes liés.</text:p>
      <text:p text:style-name="Standard"/>
      <text:p text:style-name="Standard">7. Droit applicable </text:p>
      <text:p text:style-name="Standard">Les présentes mentions légales sont soumises au droit françai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true" fo:line-height="100%" fo:text-align="start" style:justify-single-word="false" fo:orphans="2" fo:widows="2" style:register-true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104cm" fo:margin-bottom="2.182cm" fo:margin-left="1.104cm" fo:margin-right="1.099cm" style:writing-mode="lr-tb" style:layout-grid-color="#c0c0c0" style:layout-grid-lines="263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6-05T07:14:43.602000000</dc:date>
    <meta:editing-duration>PT26M52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4" meta:word-count="217" meta:character-count="1394" meta:non-whitespace-character-count="1187"/>
  </office:meta>
</office:document-meta>
</file>